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E064995868.png" manifest:media-type="image/png"/>
  <manifest:file-entry manifest:full-path="Pictures/1000000000000258000001E400B8A87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master-page-name="HTML">
      <style:paragraph-properties style:page-number="auto"/>
    </style:style>
    <style:style style:name="P2" style:family="paragraph" style:parent-style-name="Preformatted_20_Text">
      <style:paragraph-properties fo:margin-top="0in" fo:margin-bottom="0.1965in" style:contextual-spacing="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we are not using an async worker (while we keep django-tenants)</text:p>
      <text:p text:style-name="Text_20_body">Stack: Django 5.2, django-tenants 3.10, Gunicorn. Below is why moving to an async server (UvicornWorker/ASGI) gives <text:span text:style-name="T1">no benefit</text:span> while tenant isolation relies on django-tenants. Every claim cites installed-package source or the official documentation.</text:p>
      <text:h text:style-name="Heading_20_2" text:outline-level="2">1. How an async worker works</text:h>
      <text:p text:style-name="Text_20_body">An ASGI server (Gunicorn + UvicornWorker) runs <text:span text:style-name="T1">one event loop per process</text:span>: it accepts connections, does network I/O non-blockingly, and holds many connections cheaply. But <text:span text:style-name="T1">synchronous</text:span> application code cannot run on the loop itself — it would block it; Django offloads such code to a separate thread (via <text:span text:style-name="Source_20_Text">asgiref.sync.sync_to_async</text:span>). → Django docs, <text:span text:style-name="T2">Asynchronous support</text:span>: https://docs.djangoproject.com/en/5.2/topics/async/</text:p>
      <text:h text:style-name="Heading_20_2" text:outline-level="2">2. Even the “async ORM” is not async yet</text:h>
      <text:p text:style-name="Text_20_body">The QuerySet <text:span text:style-name="Source_20_Text">a</text:span>-methods are just wrappers over the sync ones. In Django source:</text:p>
      <text:p text:style-name="Preformatted_20_Text">django/db/models/query.py:646</text:p>
      <text:p text:style-name="Preformatted_20_Text"><text:s text:c="4"/>async def aget(self, *args, **kwargs):</text:p>
      <text:p text:style-name="P2"><text:s text:c="8"/>return await sync_to_async(self.get)(*args, **kwargs)</text:p>
      <text:p text:style-name="Text_20_body">(same for <text:span text:style-name="Source_20_Text">acreate</text:span>, <text:span text:style-name="Source_20_Text">aupdate</text:span>, <text:span text:style-name="Source_20_Text">adelete</text:span>, <text:span text:style-name="Source_20_Text">afirst</text:span>, … — all via <text:span text:style-name="Source_20_Text">sync_to_async</text:span>). So the real SQL runs <text:span text:style-name="T1">synchronously in a thread</text:span>, not on the event loop. Officially confirmed: “underlying database operations remain synchronous … use <text:span text:style-name="Source_20_Text">sync_to_async()</text:span>” — Django docs, <text:span text:style-name="T2">Async</text:span>.</text:p>
      <text:h text:style-name="Heading_20_2" text:outline-level="2">3. Where and why the code “hops” to a separate thread</text:h>
      <text:p text:style-name="Text_20_body">When an async server handles the request, the application code (views, ORM, our middleware) stays <text:span text:style-name="T1">synchronous</text:span>. It cannot run on the event loop: a sync call would block the loop and stall <text:span text:style-name="T1">all</text:span> other requests. So at the boundary “async server → sync code” Django <text:span text:style-name="T1">automatically switches execution to a separate thread</text:span>.</text:p>
      <text:p text:style-name="Text_20_body">The switch point is <text:span text:style-name="Source_20_Text">BaseHandler.adapt_method_mode</text:span>: while building the handling chain, Django sees a sync handler under an async server and wraps it in <text:span text:style-name="Source_20_Text">sync_to_async(..., thread_sensitive=True)</text:span>:</text:p>
      <text:p text:style-name="Preformatted_20_Text">django/core/handlers/base.py <text:s/>adapt_method_mode():</text:p>
      <text:p text:style-name="Preformatted_20_Text"><text:s text:c="4"/>if is_async and not method_is_async:</text:p>
      <text:p text:style-name="P2"><text:s text:c="8"/>return sync_to_async(method, thread_sensitive=True) <text:s text:c="2"/># approx. line 129</text:p>
      <text:p text:style-name="Text_20_body">The crux is the flag <text:span text:style-name="Source_20_Text"><text:span text:style-name="T1">thread_sensitive=True</text:span></text:span>. It tells asgiref: run this not in an arbitrary pool thread but in <text:span text:style-name="T1">one fixed thread for the whole process</text:span>. This is <text:span text:style-name="T1">deliberate</text:span> — to keep thread-bound state intact: above all Django’s <text:span text:style-name="T1">DB connections and transactions</text:span> (they are thread-local). asgiref docs:</text:p>
      <text:p text:style-name="Preformatted_20_Text">asgiref/sync.py:115 <text:s/>"By default, a single thread pool executor is shared" <text:s text:c="2"/>(thread_sensitive)</text:p>
      <text:p text:style-name="P2">asgiref/sync.py:382 <text:s/>SyncToAsync: code "...will run in the same thread..."</text:p>
      <text:p text:style-name="Text_20_body"><text:span text:style-name="T1">Consequence:</text:span> that thread is <text:span text:style-name="T1">single</text:span> and runs tasks <text:span text:style-name="T1">one at a time</text:span>. So all synchronous Django code — sync views, sync ORM, and even <text:span text:style-name="Source_20_Text">aget()</text:span> (sync underneath, see §2) — effectively runs <text:span text:style-name="T1">one request at a time per process</text:span>. The event loop is free to accept new connections meanwhile, but the <text:span text:style-name="T1">useful work runs sequentially</text:span> on that one thread.</text:p>
      <text:h text:style-name="Heading_20_2" text:outline-level="2">4. How Django middleware works</text:h>
      <text:p text:style-name="Text_20_body"><text:span text:style-name="Source_20_Text">BaseHandler.load_middleware</text:span> (<text:span text:style-name="Source_20_Text">django/core/handlers/base.py:26</text:span>) builds the chain and <text:span text:style-name="T1">adapts each middleware to the handler type</text:span> via the same <text:span text:style-name="Source_20_Text">adapt_method_mode</text:span>: a sync middleware under ASGI is wrapped in <text:span text:style-name="Source_20_Text">sync_to_async(thread_sensitive=True)</text:span>, and for a sync middleware to call an async view the view is wrapped in <text:span text:style-name="Source_20_Text">async_to_sync</text:span>, which <text:span text:style-name="T1">holds</text:span> the single thread_sensitive thread for the whole request. → Django docs, <text:span text:style-name="T2">Middleware</text:span> and <text:span text:style-name="T2">Async §Async middleware</text:span>: https://docs.djangoproject.com/en/5.2/topics/http/middleware/ , https://docs.djangoproject.com/en/5.2/topics/async/</text:p>
      <text:p text:style-name="Text_20_body">Consequence: <text:span text:style-name="T1">a single sync link</text:span> in the chain → request processing runs <text:span text:style-name="T1">one request at a time</text:span> (effectively 1 request per process), no matter how many async views you have.</text:p>
      <text:h text:style-name="Heading_20_2" text:outline-level="2">5. Why django-tenants specifically removes the point of async</text:h>
      <text:p text:style-name="Text_20_body">django-tenants isolates tenants via the PostgreSQL <text:span text:style-name="Source_20_Text">search_path</text:span>, which is <text:span text:style-name="T1">state of a specific connection</text:span>:</text:p>
      <text:p text:style-name="Preformatted_20_Text"><text:soft-page-break/>django_tenants/middleware/main.py:13 <text:s text:c="2"/>class TenantMainMiddleware(MiddlewareMixin) <text:s text:c="2"/># SYNC</text:p>
      <text:p text:style-name="Preformatted_20_Text">django_tenants/middleware/main.py:52 <text:s text:c="6"/>connection.set_tenant(request.tenant)</text:p>
      <text:p text:style-name="P2">django_tenants/postgresql_backend/base.py <text:s/>DatabaseWrapper._cursor(): runs `SET search_path` from connection.schema_name</text:p>
      <text:p text:style-name="Text_20_body">This <text:span text:style-name="Source_20_Text">set</text:span>/<text:span text:style-name="Source_20_Text">reset</text:span> of the schema <text:span text:style-name="T1">must happen one request at a time</text:span> — otherwise tenant B would read tenant A’s data on the same connection. That is exactly why the tenant-routing middleware is <text:span text:style-name="T1">synchronous</text:span> (and must be).</text:p>
      <text:p text:style-name="Text_20_body">Hence we <text:span text:style-name="T1">always</text:span> have a mandatory sync middleware in the chain → by §4 processing runs one request at a time on the single thread_sensitive thread (§3), and async views / async ORM add nothing because they too run on that thread (§2). So async gives <text:span text:style-name="T1">no throughput win here</text:span> — only overhead and sharp edges (reentrancy; transactions do not work in async on 5.2/6.0; etc.).</text:p>
      <text:h text:style-name="Heading_20_2" text:outline-level="2">How it all ties to django-tenants</text:h>
      <text:p text:style-name="Text_20_body">Everything above converges on one point precisely because of django-tenants. The general async facts — the event loop offloads synchronous code to a thread (§1); the “async ORM” actually runs SQL synchronously in a thread (<text:span text:style-name="Source_20_Text">QuerySet.aget()</text:span> → <text:span text:style-name="Source_20_Text">sync_to_async(self.get)</text:span>, §2); at the async→sync boundary Django moves execution onto one shared thread_sensitive thread per process (<text:span text:style-name="Source_20_Text">BaseHandler.adapt_method_mode</text:span> wraps sync handlers in <text:span text:style-name="Source_20_Text">sync_to_async(..., thread_sensitive=True)</text:span>, §3); and a single synchronous link in the middleware chain makes the whole chain run one request at a time (§4) — by themselves only describe Django mechanics, not a verdict on async. What turns them into a verdict is django-tenants’ isolation model: the tenant is selected by the PostgreSQL <text:span text:style-name="Source_20_Text">search_path</text:span>, which is state of a specific connection, set and reset by a <text:span text:style-name="T1">synchronous</text:span> middleware (<text:span text:style-name="Source_20_Text">TenantMainMiddleware</text:span>, and in our multi-DB setup <text:span text:style-name="Source_20_Text">ShardAwareTenantMiddleware</text:span> + <text:span text:style-name="Source_20_Text">TenantShardRoutingMiddleware</text:span>) that calls <text:span text:style-name="Source_20_Text">connection.set_tenant(...)</text:span>, while the backend’s <text:span text:style-name="Source_20_Text">DatabaseWrapper._cursor()</text:span> issues <text:span text:style-name="Source_20_Text">SET search_path</text:span> from <text:span text:style-name="Source_20_Text">connection.schema_name</text:span> — and this must happen <text:span text:style-name="T1">one request at a time</text:span>, otherwise tenant B reads tenant A’s data on the shared connection (§5). That mandatory synchronous middleware is exactly the “single sync link” from §4 that funnels all processing onto the one thread from §3; the async views (<text:span text:style-name="Source_20_Text">async def</text:span>) and async ORM (<text:span text:style-name="Source_20_Text">aget</text:span>/<text:span text:style-name="Source_20_Text">acreate</text:span>/…) from §1–§2 add nothing because they too run on that thread. So django-tenants turns the abstract limits of Django’s async stack into a concrete conclusion for us: as long as isolation rests on per-connection <text:span text:style-name="Source_20_Text">search_path</text:span>, async infrastructure yields no benefit — which is exactly what the preceding sections demonstrate step by step.</text:p>
      <text:h text:style-name="Heading_20_2" text:outline-level="2">Illustration: why the async path gives no win</text:h>
      <text:p text:style-name="Text_20_body">Two concurrent requests under UvicornWorker + the (required) sync tenant middleware: the event loop accepts both, but processing runs one request at a time on the single thread-sensitive thread, because <text:span text:style-name="Source_20_Text">search_path</text:span> is per-connection state that must be set/reset one request at a time.</text:p>
      <text:p text:style-name="Text_20_body"><draw:frame draw:style-name="fr1" draw:name="Image1" text:anchor-type="as-char" svg:width="0.7874in" style:rel-width="100%" svg:height="5.0417in" draw:z-index="0"><draw:image xlink:href="Pictures/1000000000000258000001E400B8A872.png" xlink:type="simple" xlink:show="embed" xlink:actuate="onLoad" draw:mime-type="image/png"/></draw:frame></text:p>
      <text:p text:style-name="Text_20_body">The same as a timeline — expectation vs reality vs the prefork model we chose (3 concurrent requests, 100 ms of work each):</text:p>
      <text:p text:style-name="Text_20_body"><draw:frame draw:style-name="fr1" draw:name="Image2" text:anchor-type="as-char" svg:width="0.7874in" style:rel-width="100%" svg:height="7.6665in" draw:z-index="1"><draw:image xlink:href="Pictures/1000000000000258000002E064995868.png" xlink:type="simple" xlink:show="embed" xlink:actuate="onLoad" draw:mime-type="image/png"/></draw:frame></text:p>
      <text:h text:style-name="Heading_20_2" text:outline-level="2">Summary</text:h>
      <text:p text:style-name="Text_20_body">While tenant isolation relies on per-connection <text:span text:style-name="Source_20_Text">search_path</text:span> (django-tenants), async infrastructure does not speed up request processing. So we chose <text:span text:style-name="T1">synchronous prefork workers</text:span>: <text:span text:style-name="Source_20_Text">N</text:span> processes = <text:span text:style-name="Source_20_Text">N</text:span> truly parallel requests (separate GILs, separate connections, clean per-request schema set/reset). Going async will only make sense after dropping connection-based isolation (a different tenant-storage model) — a separate architectural decision, not a free upgra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Why we are not using an async worker</dc:title>
    <meta:document-statistic meta:table-count="0" meta:image-count="2" meta:object-count="0" meta:page-count="2" meta:paragraph-count="39" meta:word-count="1022" meta:character-count="7306" meta:non-whitespace-character-count="6266"/>
    <meta:generator>LibreOffice/24.2.7.2$Linux_X86_64 LibreOffice_project/420$Build-2</meta:generator>
    <meta:user-defined meta:name=""/>
  </office:meta>
</office:document-meta>
</file>